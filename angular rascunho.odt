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Tipodeletrapredefinidodoparágrafo" style:family="text">
      <style:text-properties fo:font-weight="bold" style:font-weight-asian="bold" style:font-weight-complex="bold"/>
    </style:style>
    <style:style style:name="P3" style:parent-style-name="Normal" style:family="paragraph">
      <style:paragraph-properties fo:margin-bottom="0in" style:line-height-at-least="0.1979in" fo:background-color="#1E1E1E"/>
    </style:style>
    <style:style style:name="T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5"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6"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7" style:parent-style-name="Normal" style:family="paragraph">
      <style:paragraph-properties fo:margin-bottom="0in" style:line-height-at-least="0.1979in" fo:background-color="#1E1E1E"/>
    </style:style>
    <style:style style:name="T8"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9"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0"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1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2"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1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4"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15"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16" style:parent-style-name="Normal" style:family="paragraph">
      <style:paragraph-properties fo:margin-bottom="0in" style:line-height-at-least="0.1979in" fo:background-color="#1E1E1E"/>
    </style:style>
    <style:style style:name="T17"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8"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9"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3"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25" style:parent-style-name="Normal" style:family="paragraph">
      <style:paragraph-properties fo:margin-bottom="0in" style:line-height-at-least="0.1979in" fo:background-color="#1E1E1E"/>
    </style:style>
    <style:style style:name="T26"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8"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0"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2"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4"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5"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6"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38" style:parent-style-name="Normal" style:family="paragraph">
      <style:paragraph-properties fo:margin-bottom="0in" style:line-height-at-least="0.1979in" fo:background-color="#1E1E1E"/>
    </style:style>
    <style:style style:name="T3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4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41"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4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43" style:parent-style-name="Normal" style:family="paragraph">
      <style:text-properties fo:font-weight="bold" style:font-weight-asian="bold" style:font-weight-complex="bold" fo:font-size="14pt" style:font-size-asian="14pt" style:font-size-complex="14pt"/>
    </style:style>
    <style:style style:name="T44" style:parent-style-name="Tipodeletrapredefinidodoparágrafo" style:family="text">
      <style:text-properties fo:font-weight="bold" style:font-weight-asian="bold" style:font-weight-complex="bold"/>
    </style:style>
    <style:style style:name="T45" style:parent-style-name="Tipodeletrapredefinidodoparágrafo" style:family="text">
      <style:text-properties fo:font-weight="bold" style:font-weight-asian="bold" style:font-weight-complex="bold"/>
    </style:style>
    <style:style style:name="T46" style:parent-style-name="Tipodeletrapredefinidodoparágrafo" style:family="text">
      <style:text-properties fo:font-weight="bold" style:font-weight-asian="bold" style:font-weight-complex="bold"/>
    </style:style>
    <style:style style:name="T47" style:parent-style-name="Tipodeletrapredefinidodoparágrafo" style:family="text">
      <style:text-properties fo:font-weight="bold" style:font-weight-asian="bold" style:font-weight-complex="bold"/>
    </style:style>
    <style:style style:name="T48" style:parent-style-name="Tipodeletrapredefinidodoparágrafo" style:family="text">
      <style:text-properties fo:font-weight="bold" style:font-weight-asian="bold" style:font-weight-complex="bold"/>
    </style:style>
    <style:style style:name="T49" style:parent-style-name="Tipodeletrapredefinidodoparágrafo" style:family="text">
      <style:text-properties fo:font-weight="bold" style:font-weight-asian="bold" style:font-weight-complex="bold"/>
    </style:style>
    <style:style style:name="T50" style:parent-style-name="Tipodeletrapredefinidodoparágrafo" style:family="text">
      <style:text-properties fo:font-weight="bold" style:font-weight-asian="bold" style:font-weight-complex="bold"/>
    </style:style>
    <style:style style:name="T51" style:parent-style-name="Tipodeletrapredefinidodoparágrafo"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ge" style:horizontal-pos="right" style:vertical-pos="from-top" draw:luminance="0%" draw:contrast="0%" draw:image-opacity="100%"/>
    </style:style>
    <style:style style:family="graphic" style:name="a4" style:parent-style-name="Graphics">
      <style:graphic-properties fo:border="none" fo:background-color="transparent"/>
    </style:style>
  </office:automatic-styles>
  <office:body>
    <office:text text:use-soft-page-breaks="true">
      <text:p text:style-name="P1">--cria novo component chamado login, o npm run ng , corre comandos ng</text:p>
      <text:p text:style-name="Normal"><text:s/>npm run ng generate component login</text:p>
      <text:p text:style-name="Normal">npm run ng generate directive login</text:p>
      <text:p text:style-name="Normal"/>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text:span text:style-name="T2">cria um novo projeto</text:span></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p text:style-name="Normal">--</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 Injeta código.</text:p>
      <text:p text:style-name="Normal"/>
      <text:soft-page-break/>
      <text:p text:style-name="Normal">Angular provides three types of directives:</text:p>
      <text:p text:style-name="Normal"/>
      <text:p text:style-name="Normal">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draw:frame draw:z-index="251658240" draw:style-name="a0" draw:name="Image1" text:anchor-type="paragraph" svg:x="1.18958in" svg:y="5.35833in" svg:width="5.90486in" svg:height="3.52778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Existem dois Styles tenho de ver o primeiro,</text:p>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incluir no html</text:p>
      <text:p text:style-name="P3"><text:span text:style-name="T4">&lt;</text:span><text:span text:style-name="T5">head</text:span><text:span text:style-name="T6">&gt;</text:span></text:p>
      <text:p text:style-name="P7"><text:span text:style-name="T8">   <text:s/></text:span><text:span text:style-name="T9">&lt;</text:span><text:span text:style-name="T10">meta</text:span><text:span text:style-name="T11"><text:s/></text:span><text:span text:style-name="T12">charset</text:span><text:span text:style-name="T13">=</text:span><text:span text:style-name="T14">"UTF-8"</text:span><text:span text:style-name="T15">&gt;</text:span></text:p>
      <text:p text:style-name="P16"><text:span text:style-name="T17">   <text:s/></text:span><text:span text:style-name="T18">&lt;</text:span><text:span text:style-name="T19">title</text:span><text:span text:style-name="T20">&gt;</text:span><text:span text:style-name="T21">Título da Página</text:span><text:span text:style-name="T22">&lt;/</text:span><text:span text:style-name="T23">title</text:span><text:span text:style-name="T24">&gt;</text:span></text:p>
      <text:p text:style-name="P25"><text:span text:style-name="T26">   <text:s/></text:span><text:span text:style-name="T27">&lt;</text:span><text:span text:style-name="T28">link</text:span><text:span text:style-name="T29"><text:s/></text:span><text:span text:style-name="T30">rel</text:span><text:span text:style-name="T31">=</text:span><text:span text:style-name="T32">"stylesheet"</text:span><text:span text:style-name="T33"><text:s/></text:span><text:span text:style-name="T34">href</text:span><text:span text:style-name="T35">=</text:span><text:span text:style-name="T36">"https://maxcdn.bootstrapcdn.com/bootstrap/4.0.0/css/bootstrap.min.css"</text:span><text:span text:style-name="T37">&gt;</text:span></text:p>
      <text:p text:style-name="P38"><text:span text:style-name="T39"> <text:s/></text:span><text:span text:style-name="T40">&lt;/</text:span><text:span text:style-name="T41">head</text:span><text:span text:style-name="T42">&gt;</text:span></text:p>
      <text:p text:style-name="Normal"/>
      <text:p text:style-name="Normal"/>
      <text:soft-page-break/>
      <text:p text:style-name="Normal">----</text:p>
      <text:p text:style-name="Normal">no ficheiro angular.json, podemos adicionar outro estilo, em "styles", como <text:s/>"node_modules/bootstrap/dist/css/bootstrap.min.css",</text:p>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text:p>
      <text:p text:style-name="Normal"/>
      <text:p text:style-name="Normal">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text:p>
      <text:p text:style-name="Normal"/>
      <text:p text:style-name="Normal">peguntas--</text:p>
      <text:p text:style-name="Normal"/>
      <text:p text:style-name="Normal"/>
      <text:p text:style-name="Normal"/>
      <text:p text:style-name="Normal">em environment.ts o que é <text:s/>production: false, e este url: 'https://bko-hub.azurewebsites.net/api/' esta api é</text:p>
      <text:p text:style-name="Normal">para o quê?</text:p>
      <text:p text:style-name="Normal">export const environment = {</text:p>
      <text:p text:style-name="Normal"><text:s text:c="4"/>production: false,</text:p>
      <text:p text:style-name="Normal"><text:s text:c="4"/>url: 'https://bko-hub.azurewebsites.net/api/'</text:p>
      <text:p text:style-name="Normal">};</text:p>
      <text:p text:style-name="Normal"/>
      <text:p text:style-name="Normal"/>
      <text:p text:style-name="Normal">para que é que serve a class AuthInterceptor</text:p>
      <text:p text:style-name="Normal"/>
      <text:p text:style-name="Normal"/>
      <text:p text:style-name="Normal">também um pouco perdido para que é que serve na class TokenStorageService , depois do generate</text:p>
      <text:p text:style-name="Normal">para que é que precisamos de removeItem <text:s/>e depois do setItem</text:p>
      <text:p text:style-name="Normal"/>
      <text:p text:style-name="Normal">o gettoken só recebe uma string</text:p>
      <text:p text:style-name="Normal"/>
      <text:p text:style-name="Normal"/>
      <text:p text:style-name="Normal"/>
      <text:p text:style-name="Normal">ver <text:s/>this.subscription = this.configServices</text:p>
      <text:p text:style-name="Normal"/>
      <text:p text:style-name="Normal"/>
      <text:p text:style-name="P43">Angular LifeCycle</text:p>
      <text:p text:style-name="Normal"/>
      <text:p text:style-name="Normal">Sempre que o componente é instanciado, angular passa por algumas fases.</text:p>
      <text:p text:style-name="Normal">-<text:span text:style-name="T44">ngOnChanges</text:span>- é executado no inicio quando o componente é criado e quando as input properties é mudada <text:s/>o @input.</text:p>
      <text:p text:style-name="Normal">-<text:span text:style-name="T45">ngOnInit</text:span>- é chamado quando o componente é inicializado, depois do construtor.</text:p>
      <text:soft-page-break/>
      <text:p text:style-name="Normal">-<text:span text:style-name="T46">ngDoCheck</text:span>- corre quando quando a change detection corre, que é quando algo muda no template do componente, como por exemplo um valor da propriedade muda. Corre também quando carregamos num botão, portanto um evento.</text:p>
      <text:p text:style-name="Normal">-<text:span text:style-name="T47">ngAfterContentInit</text:span>- é inicializado quando o ng-content é inicializado , a view do componente pai</text:p>
      <text:p text:style-name="Normal">-<text:span text:style-name="T48">ngAfterContentChecked</text:span>- é executado quando deteta mudanças por projected contente.</text:p>
      <text:p text:style-name="Normal">-<text:span text:style-name="T49">ngAfterViewInit</text:span>- quando a view do componente é finished initialized rendered.</text:p>
      <text:p text:style-name="Normal"><text:span text:style-name="T50">ngAfterViewChecked</text:span><text:s/>– é chamado quando a nossa view ou child view é checked, portanto depois de todas as mudanças da view.</text:p>
      <text:p text:style-name="Normal">-<text:span text:style-name="T51">ngOnDestroy</text:span>- destroy o objeto.</text:p>
      <text:p text:style-name="Normal"><draw:frame draw:style-name="a1" draw:name="Imagem 1" text:anchor-type="as-char" svg:x="0in" svg:y="0in" svg:width="5.90551in" svg:height="3.31181in" style:rel-width="scale" style:rel-height="scale"><draw:image xlink:href="media/image2.png" xlink:type="simple" xlink:show="embed" xlink:actuate="onLoad"/><svg:title/><svg:desc/></draw:frame></text:p>
      <text:p text:style-name="Normal"/>
      <text:p text:style-name="Normal"/>
      <text:soft-page-break/>
      <text:p text:style-name="Normal"><draw:frame draw:style-name="a2" draw:name="Imagem 4" text:anchor-type="as-char" svg:x="0in" svg:y="0in" svg:width="5.90551in" svg:height="3.18543in" style:rel-width="scale" style:rel-height="scale"><draw:image xlink:href="media/image3.png" xlink:type="simple" xlink:show="embed" xlink:actuate="onLoad"/><svg:title/><svg:desc/></draw:frame><text:s/></text:p>
      <text:p text:style-name="Normal"/>
      <text:p text:style-name="Normal">Serviços agem como repositórios centrais, ou unidades de negócio centrais, algo que podemos guardar, onde podemos centralizar o nosso código.</text:p>
      <text:p text:style-name="Normal">Podemos criar um log service para centralizar o nosso log statement.</text:p>
      <text:p text:style-name="Normal">Um user service para manage data storage .</text:p>
      <text:p text:style-name="Normal"/>
      <text:p text:style-name="Normal"/>
      <text:p text:style-name="Normal">Shopp app routing que é root image</text:p>
      <text:p text:style-name="Normal"><draw:frame draw:z-index="3" draw:style-name="a3" draw:name="Image2" text:anchor-type="paragraph" svg:x="0in" svg:y="7.0125in" svg:width="5.90486in" svg:height="3.35208in" style:rel-width="scale" style:rel-height="scale"><draw:image xlink:href="media/image4.png" xlink:type="simple" xlink:show="embed" xlink:actuate="onLoad"/><svg:title/><svg:desc/></draw:frame></text:p>
      <text:p text:style-name="Normal"/>
      <text:p text:style-name="Normal"/>
      <text:p text:style-name="Normal"/>
      <text:p text:style-name="Normal">Permissões</text:p>
      <text:p text:style-name="Normal"><draw:frame draw:style-name="a4" draw:name="Imagem 5" text:anchor-type="as-char" svg:x="0in" svg:y="0in" svg:width="5.90556in" svg:height="2.61528in" style:rel-width="scale" style:rel-height="scale"><draw:image xlink:href="media/image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Pereira</meta:initial-creator>
    <dc:creator>Nuno Pereira</dc:creator>
    <meta:creation-date>2023-03-08T09:13:00Z</meta:creation-date>
    <dc:date>2023-03-16T17:32:00Z</dc:date>
    <meta:template xlink:href="Normal.dotm" xlink:type="simple"/>
    <meta:editing-cycles>28</meta:editing-cycles>
    <meta:editing-duration>PT78540S</meta:editing-duration>
    <meta:document-statistic meta:page-count="8" meta:paragraph-count="9" meta:word-count="718" meta:character-count="4588" meta:row-count="32" meta:non-whitespace-character-count="3879"/>
  </office:meta>
</office:document-meta>
</file>